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E0000016EC3032C43.png" manifest:media-type="image/png"/>
  <manifest:file-entry manifest:full-path="Pictures/100000010000022C000001878F78466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paragraph-rsid="00185506"/>
    </style:style>
    <style:style style:name="P2" style:family="paragraph" style:parent-style-name="Preformatted_20_Text">
      <style:paragraph-properties fo:text-align="center" style:justify-single-word="false"/>
      <style:text-properties officeooo:paragraph-rsid="00185506"/>
    </style:style>
    <style:style style:name="P3" style:family="paragraph" style:parent-style-name="Preformatted_20_Text">
      <style:paragraph-properties fo:text-align="center" style:justify-single-word="false"/>
    </style:style>
    <style:style style:name="P4" style:family="paragraph" style:parent-style-name="Preformatted_20_Text">
      <style:paragraph-properties fo:margin-top="0in" fo:margin-bottom="0.1965in" style:contextual-spacing="false" fo:text-align="center" style:justify-single-word="false"/>
    </style:style>
    <style:style style:name="P5" style:family="paragraph" style:parent-style-name="Preformatted_20_Text">
      <style:paragraph-properties fo:margin-top="0in" fo:margin-bottom="0.1965in" style:contextual-spacing="false" fo:text-align="center" style:justify-single-word="false"/>
      <style:text-properties officeooo:paragraph-rsid="00185506"/>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text-properties fo:font-size="12pt" fo:font-weight="normal" officeooo:rsid="001a3f29" officeooo:paragraph-rsid="001a3f29" style:font-size-asian="10.5pt" style:font-weight-asian="normal" style:font-size-complex="12pt" style:font-weight-complex="normal"/>
    </style:style>
    <style:style style:name="P8" style:family="paragraph" style:parent-style-name="Standard">
      <style:text-properties fo:font-size="12pt" fo:font-weight="normal" officeooo:rsid="0026d126" officeooo:paragraph-rsid="0026d126" style:font-size-asian="10.5pt" style:font-weight-asian="normal" style:font-size-complex="12pt" style:font-weight-complex="normal"/>
    </style:style>
    <style:style style:name="P9" style:family="paragraph" style:parent-style-name="Standard">
      <style:text-properties fo:font-size="12pt" fo:font-weight="bold" style:font-size-asian="10.5pt" style:font-weight-asian="bold" style:font-size-complex="12pt" style:font-weight-complex="bold"/>
    </style:style>
    <style:style style:name="P10" style:family="paragraph" style:parent-style-name="Standard">
      <style:text-properties fo:font-size="16pt" fo:font-weight="bold" officeooo:rsid="0018e823" officeooo:paragraph-rsid="0018e823" style:font-size-asian="16pt" style:font-weight-asian="bold" style:font-size-complex="16pt" style:font-weight-complex="bold"/>
    </style:style>
    <style:style style:name="P11" style:family="paragraph" style:parent-style-name="Standard">
      <style:text-properties fo:font-size="12pt" fo:font-weight="normal" officeooo:rsid="001a3f29" officeooo:paragraph-rsid="001dd10c" style:font-size-asian="10.5pt" style:font-weight-asian="normal" style:font-size-complex="12pt" style:font-weight-complex="normal"/>
    </style:style>
    <style:style style:name="P12" style:family="paragraph" style:parent-style-name="Text_20_body">
      <style:text-properties fo:font-size="12pt" fo:font-weight="normal" officeooo:rsid="0023da21" officeooo:paragraph-rsid="0023da21" style:font-size-asian="10.5pt" style:font-weight-asian="normal" style:font-size-complex="12pt" style:font-weight-complex="normal"/>
    </style:style>
    <style:style style:name="P13" style:family="paragraph" style:parent-style-name="Text_20_body" style:list-style-name="L1">
      <style:paragraph-properties fo:margin-left="0in" fo:margin-right="0in" fo:margin-top="0in" fo:margin-bottom="0in" style:contextual-spacing="false" fo:text-indent="0in" style:auto-text-indent="false"/>
      <style:text-properties officeooo:rsid="001a3f29"/>
    </style:style>
    <style:style style:name="P14" style:family="paragraph" style:parent-style-name="Text_20_body" style:list-style-name="L1">
      <style:paragraph-properties fo:margin-left="0in" fo:margin-right="0in" fo:text-indent="0in" style:auto-text-indent="false"/>
      <style:text-properties officeooo:rsid="001a3f29"/>
    </style:style>
    <style:style style:name="P15" style:family="paragraph" style:parent-style-name="Text_20_body">
      <style:paragraph-properties fo:margin-left="0in" fo:margin-right="0in" fo:text-indent="0in" style:auto-text-indent="false"/>
      <style:text-properties officeooo:rsid="0023da21" officeooo:paragraph-rsid="0023da21"/>
    </style:style>
    <style:style style:name="P16" style:family="paragraph" style:parent-style-name="Standard">
      <style:text-properties fo:font-size="12pt" fo:font-weight="normal" officeooo:rsid="001dd10c" officeooo:paragraph-rsid="001dd10c" style:font-size-asian="10.5pt" style:font-weight-asian="normal" style:font-size-complex="12pt" style:font-weight-complex="normal"/>
    </style:style>
    <style:style style:name="P17" style:family="paragraph" style:parent-style-name="Standard">
      <loext:graphic-properties draw:fill="solid" draw:fill-color="#1e1e2e"/>
      <style:paragraph-properties fo:background-color="#1e1e2e" fo:padding="0in" fo:border="none" style:shadow="none"/>
    </style:style>
    <style:style style:name="P18" style:family="paragraph" style:parent-style-name="Standard">
      <style:text-properties fo:font-size="12pt" fo:font-weight="normal" officeooo:rsid="001a3f29" officeooo:paragraph-rsid="001f840b" style:font-size-asian="10.5pt" style:font-weight-asian="normal" style:font-size-complex="12pt" style:font-weight-complex="normal"/>
    </style:style>
    <style:style style:name="P19" style:family="paragraph" style:parent-style-name="Standard">
      <style:text-properties fo:font-size="16pt" fo:font-weight="bold" officeooo:rsid="001dd10c" officeooo:paragraph-rsid="001dd10c" style:font-size-asian="16pt" style:font-weight-asian="bold" style:font-size-complex="16pt" style:font-weight-complex="bold"/>
    </style:style>
    <style:style style:name="P20" style:family="paragraph" style:parent-style-name="Standard">
      <style:text-properties officeooo:paragraph-rsid="00210375"/>
    </style:style>
    <style:style style:name="P21" style:family="paragraph" style:parent-style-name="Standard">
      <style:text-properties fo:font-size="12pt" fo:font-weight="normal" officeooo:rsid="00210375" officeooo:paragraph-rsid="00210375" style:font-size-asian="10.5pt" style:font-weight-asian="normal" style:font-size-complex="12pt" style:font-weight-complex="normal"/>
    </style:style>
    <style:style style:name="P22" style:family="paragraph" style:parent-style-name="Standard">
      <style:text-properties officeooo:rsid="002b6f94" officeooo:paragraph-rsid="002b6f94"/>
    </style:style>
    <style:style style:name="P23" style:family="paragraph" style:parent-style-name="Standard">
      <style:text-properties fo:font-size="12pt" fo:font-weight="normal" officeooo:rsid="002b6f94" officeooo:paragraph-rsid="002b6f94" style:font-size-asian="10.5pt" style:font-weight-asian="normal" style:font-size-complex="12pt" style:font-weight-complex="normal"/>
    </style:style>
    <style:style style:name="P24" style:family="paragraph" style:parent-style-name="Standard" style:list-style-name="L2">
      <style:text-properties officeooo:paragraph-rsid="002b6f94"/>
    </style:style>
    <style:style style:name="P25" style:family="paragraph" style:parent-style-name="Standard">
      <style:text-properties officeooo:paragraph-rsid="002b6f94"/>
    </style:style>
    <style:style style:name="T1" style:family="text">
      <style:text-properties style:font-name="Liberation Mono" fo:font-size="24pt" style:font-name-asian="Liberation Mono" style:font-size-asian="24pt" style:font-name-complex="Liberation Mono" style:font-size-complex="24pt"/>
    </style:style>
    <style:style style:name="T2" style:family="text">
      <style:text-properties officeooo:rsid="00185506"/>
    </style:style>
    <style:style style:name="T3" style:family="text">
      <style:text-properties officeooo:rsid="0026d126"/>
    </style:style>
    <style:style style:name="T4" style:family="text">
      <style:text-properties officeooo:rsid="00283e06"/>
    </style:style>
    <style:style style:name="T5" style:family="text">
      <style:text-properties officeooo:rsid="001c0ba9"/>
    </style:style>
    <style:style style:name="T6" style:family="text">
      <style:text-properties officeooo:rsid="001a3f29"/>
    </style:style>
    <style:style style:name="T7" style:family="text">
      <style:text-properties style:text-position="super 58%"/>
    </style:style>
    <style:style style:name="T8" style:family="text">
      <style:text-properties officeooo:rsid="001f840b"/>
    </style:style>
    <style:style style:name="T9" style:family="text">
      <style:text-properties style:text-position="super 58%" officeooo:rsid="001f840b"/>
    </style:style>
    <style:style style:name="T10" style:family="text">
      <style:text-properties fo:color="#cdd6f4" loext:opacity="100%" fo:font-family="'JetBrains Mono'" style:font-family-generic="roman" style:font-pitch="variable" fo:font-size="10pt" fo:font-style="normal" fo:font-weight="normal" style:font-size-asian="10pt" style:font-style-asian="normal" style:font-weight-asian="normal"/>
    </style:style>
    <style:style style:name="T11" style:family="text">
      <style:text-properties fo:color="#a6e3a1" loext:opacity="100%" fo:font-family="'JetBrains Mono'" style:font-family-generic="roman" style:font-pitch="variable" fo:font-size="10pt" fo:font-style="normal" fo:font-weight="normal" style:font-size-asian="10pt" style:font-style-asian="normal" style:font-weight-asian="normal"/>
    </style:style>
    <style:style style:name="T12" style:family="text">
      <style:text-properties fo:font-size="12pt" fo:font-weight="normal" officeooo:rsid="00210375" style:font-size-asian="10.5pt" style:font-weight-asian="normal" style:font-size-complex="12pt" style:font-weight-complex="normal"/>
    </style:style>
    <style:style style:name="T13" style:family="text">
      <style:text-properties style:text-position="super 58%" fo:font-size="12pt" fo:font-weight="normal" officeooo:rsid="00210375" style:font-size-asian="10.5pt" style:font-weight-asian="normal" style:font-size-complex="12pt" style:font-weight-complex="normal"/>
    </style:style>
    <style:style style:name="T14" style:family="text">
      <style:text-properties fo:font-size="12pt" fo:font-weight="normal" officeooo:rsid="0029c4d7" style:font-size-asian="10.5pt" style:font-weight-asian="normal" style:font-size-complex="12pt" style:font-weight-complex="normal"/>
    </style:style>
    <style:style style:name="T15" style:family="text">
      <style:text-properties fo:font-size="12pt" fo:font-weight="normal" officeooo:rsid="0022e78c" style:font-size-asian="10.5pt" style:font-weight-asian="normal" style:font-size-complex="12pt" style:font-weight-complex="normal"/>
    </style:style>
    <style:style style:name="T16" style:family="text">
      <style:text-properties fo:font-size="12pt" fo:font-weight="normal" officeooo:rsid="002b6f94" style:font-size-asian="10.5pt" style:font-weight-asian="normal" style:font-size-complex="12pt" style:font-weight-complex="normal"/>
    </style:style>
    <style:style style:name="T17"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officeooo:rsid="002ce076"/>
    </style:style>
    <style:style style:name="T20" style:family="text">
      <style:text-properties fo:font-size="12pt" fo:font-weight="normal" officeooo:rsid="002c2f95" style:font-size-asian="10.5pt" style:font-weight-asian="normal" style:font-size-complex="12pt" style:font-weight-complex="normal"/>
    </style:style>
    <style:style style:name="T21" style:family="text">
      <style:text-properties style:font-name="Liberation Serif" fo:font-size="12pt" fo:font-weight="normal" officeooo:rsid="002b6f94" style:font-size-asian="10.5pt" style:font-weight-asian="normal" style:font-size-complex="12pt" style:font-weight-complex="normal"/>
    </style:style>
    <style:style style:name="T22" style:family="text">
      <style:text-properties style:font-name="Liberation Serif" fo:font-size="12pt" fo:font-weight="normal" officeooo:rsid="002c2f95" style:font-size-asian="10.5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ource_20_Text"><text:span text:style-name="T1">CO₂ Dynamics in a Mofette</text:span></text:span></text:h>
      <text:p text:style-name="P2"><text:span text:style-name="Source_20_Text"/></text:p>
      <text:p text:style-name="P2"><text:span text:style-name="Source_20_Text"/></text:p>
      <text:p text:style-name="P2"><text:span text:style-name="Source_20_Text"><text:span text:style-name="T2">Andreescu Arthur-Daniel</text:span></text:span></text:p>
      <text:p text:style-name="P3"><text:span text:style-name="Source_20_Text">Popescu Lucian</text:span></text:p>
      <text:p text:style-name="P4"><text:span text:style-name="Source_20_Text">Szakács Apor-Tamás</text:span></text:p>
      <text:p text:style-name="P5"><text:span text:style-name="Source_20_Text"><text:span text:style-name="T2">18.06.2026</text:span></text:span></text:p>
      <text:p text:style-name="Standard"/>
      <text:p text:style-name="P6"><text:span text:style-name="T2">A</text:span>im and research</text:p>
      <text:p text:style-name="P6"/>
      <text:p text:style-name="P7">The aim of the project is to analyze and find periodicity in the sensor data provided about the mofette. We also work on the restructuring and analysis of the data and the validity of the data. <text:span text:style-name="T3">In the project we inv</text:span><text:span text:style-name="T4">e</text:span><text:span text:style-name="T3">stigate the following questions:</text:span></text:p>
      <text:p text:style-name="P7"/>
      <text:p text:style-name="P8">Is there a 24 hour periodicity in the dataset that we can extract using various DSP methods?</text:p>
      <text:p text:style-name="P8"/>
      <text:p text:style-name="P8">Is there a correlation between CO2 levels and other environmental data?</text:p>
      <text:p text:style-name="P9"/>
      <text:p text:style-name="P10">Background</text:p>
      <text:p text:style-name="P10"/>
      <text:p text:style-name="P11">Our study is based on a research paper from 2025 titled: CO2 Dynamics in a Mofette: Measurement and Modeling. The paper is about the monitoring of gas concentration, temperature, humidity and air pressure inside a mofette <text:span text:style-name="T5">in Covasna</text:span>.</text:p>
      <text:p text:style-name="P11"><draw:frame draw:style-name="fr1" draw:name="Image1" text:anchor-type="char" svg:width="5.7917in" svg:height="4.0728in" draw:z-index="0"><draw:image xlink:href="Pictures/100000010000022C000001878F784667.png" xlink:type="simple" xlink:show="embed" xlink:actuate="onLoad" draw:mime-type="image/png"/></draw:frame></text:p>
      <text:p text:style-name="P11"><text:soft-page-break/>A mofette is <text:span text:style-name="T5">a vent from which CO2 and other gases escape from the earth in a last stage of volcanic activity. Buildings are built around these vents for medical purposes to releave certain circulatory problems. A measurement device was placed in such a building and we’re working on a dataset produced by the device. The device has 20 STC31 sensors that measure CO2 concentration and temperature. These sensors were placed 5 cm apart vertically. There were 4 additional such sensors on the side of the device. Besides that, there were also 2 BMP280 sensors measuring barometric pressure and temperature on the top and bottom of the device and 2 DHT11 humidity sensors also on the top and on the bottom of the device.</text:span><draw:frame draw:style-name="fr2" draw:name="Image2" text:anchor-type="char" svg:width="6.9252in" svg:height="3.7827in" draw:z-index="1"><draw:image xlink:href="Pictures/100000010000029E0000016EC3032C43.png" xlink:type="simple" xlink:show="embed" xlink:actuate="onLoad" draw:mime-type="image/png"/></draw:frame></text:p>
      <text:p text:style-name="P11"/>
      <text:p text:style-name="P11"/>
      <text:p text:style-name="P12">We used the following methods to analyze the dataset:</text:p>
      <text:list text:style-name="L1">
        <text:list-item>
          <text:p text:style-name="P13"><text:span text:style-name="Strong_20_Emphasis">Spectral Estimation (Welch's Method):</text:span> Used to compute the Power Spectral Density (PSD) to identify dominant periodicities in the CO₂ signal.</text:p>
        </text:list-item>
        <text:list-item>
          <text:p text:style-name="P13"><text:span text:style-name="Strong_20_Emphasis">Time-Frequency Analysis (Spectrograms):</text:span> Used to observe how the frequency content changes in intensity over the 7-month campaign.</text:p>
        </text:list-item>
        <text:list-item>
          <text:p text:style-name="P13"><text:span text:style-name="Strong_20_Emphasis">Digital Filtering (Butterworth Lowpass/Bandpass):</text:span> Used to isolate specific frequency bands—lowpass filters to extract long-term seasonal trends, and bandpass filters to isolate the pure daily breathing cycle.</text:p>
        </text:list-item>
        <text:list-item>
          <text:p text:style-name="P14"><text:span text:style-name="Strong_20_Emphasis">Cross-Correlation:</text:span> Used to quantify the lag and correlation between CO₂ levels and environmental drivers.</text:p>
        </text:list-item>
      </text:list>
      <text:p text:style-name="P15">The above mentioned concepts are useful because they allow us to extract signals from noisy overlapping physical processes. Using these methods we can prove that the mofette’s CO2 levels are changing with a period of 24 hours. We can also remove high frequency sensor noise and isolate specific phenomena instead of relying on visual guesswork.</text:p>
      <text:p text:style-name="P15"><text:soft-page-break/>These methods have their limitations. In the case of the Welch’s method (or any other method that is used to calculate the PSD) the trade-off is the bias-variance tradeoff. <text:span text:style-name="T6">In the </text:span>case of the <text:span text:style-name="T6">spectrogram, we cannot simultaneously have perfect time and frequency resolution. </text:span>In the case of the filters, the limitation is that they introduce phase delays.</text:p>
      <text:p text:style-name="P11"/>
      <text:p text:style-name="P10"/>
      <text:p text:style-name="P10">Data</text:p>
      <text:p text:style-name="P10"/>
      <text:p text:style-name="P16">The data represent <text:span text:style-name="T4">real environmental measurements from </text:span>the monitoring period <text:span text:style-name="T4">of:</text:span> the 8<text:span text:style-name="T7">th</text:span> of April, 2022, to the 7<text:span text:style-name="T7">th</text:span> of November, 2022. The dataset spans over 200 days and has 17.3 million recordings in it. Measurements were taken second by second. We got access to a file named ‘new_device_column1.txt’ which had alternating lines of timestamps and measurement data. The raw text file was around 6 GB. <text:span text:style-name="T8">The entries in the text file looked like this: 1</text:span><text:span text:style-name="T9">st</text:span><text:span text:style-name="T8"> line – timestamp, 2</text:span><text:span text:style-name="T9">nd</text:span><text:span text:style-name="T8"> line – barometric pressure, humidity, temperature on the top, barometric pressure, humidity, temperature on the bottom, then CO2 and temperature of main STC31 sensors 1 to 20, then the CO2 and temperature values of the STC31 sensors from the side (1 to 4).</text:span></text:p>
      <text:p text:style-name="P16"/>
      <text:p text:style-name="P17" loext:marker-style-name="T10"><text:span text:style-name="T10">Example Lines from the Data File<text:line-break/><text:line-break/>1649455396.5622404 b'93512.25 65.00 9.34 93925.87 89.00 8.37 75.60 8.38 74.48 8.48 72.94 8.53 70.99 8.59 69.48 8.74 67.15 8.91 65.19 9.17 62.17 9.46 59.56 9.75 56.56 9.69 52.60 9.47 48.85 9.38 45.32 9.26 40.85 9.28 35.84 9.29 29.83 9.32 23.54 9.26 8.60 9.33 15.15 9.34 4.57 9.46 48.37 8.94 55.18 8.83 61.56 8.77 66.92 8.60 \r\n' 1649455396.5795734 b'93512.25 65.00 9.34 93925.70 89.00 8.37 75.62 8.40 74.51 8.48 72.96 8.55 71.04 8.61 69.43 8.75 66.89 8.90 65.19 9.20 62.06 9.45 59.33 9.73 56.30 9.72 52.24 9.41 48.61 9.40 45.13 9.29 40.63 9.28 35.68 9.27 29.63 9.29 23.34 9.26 8.37 9.34 14.93 9.33 4.52 9.43 48.25 8.92 55.13 8.80 61.44 8.78 66.76 8.58 \r\n'<text:line-break/></text:span></text:p>
      <text:p text:style-name="P16"/>
      <text:p text:style-name="P16"/>
      <text:p text:style-name="P17" loext:marker-style-name="T11"><text:span text:style-name="T11">Example 1: b'93512.25 65.00 9.34 ... 66.92 8.60 \r\n'<text:line-break/> <text:s text:c="3"/>93512.25 - Barometric pressure (topmost BMP280)<text:line-break/> <text:s text:c="3"/>65.00 - Humidity (topmost DHT11)<text:line-break/> <text:s text:c="3"/>9.34 - Temperature (topmost BMP280)<text:line-break/> <text:s text:c="3"/>93925.87 - Barometric pressure (bottommost BMP280)<text:line-break/> <text:s text:c="3"/>89.00 - Humidity (bottommost DHT11)<text:line-break/> <text:s text:c="3"/>8.37 - Temperature (bottommost BMP280)<text:line-break/> <text:s text:c="3"/>75.60 8.38 ... 29.63 9.29 - CO2 concentrations and temperatures from STC31 sensors in the main stack<text:line-break/> <text:s text:c="3"/>48.37 8.94 55.18 8.83 61.56 8.77 66.92 8.60 - CO2 concentrations and temperatures from STC31 sensors in the side tube</text:span></text:p>
      <text:p text:style-name="P18"/>
      <text:p text:style-name="P19"/>
      <text:p text:style-name="P10">Preprocessing</text:p>
      <text:p text:style-name="P10"/>
      <text:p text:style-name="P20"><text:span text:style-name="T12">Working with data this large requires 50 GB of RAM to load in memory. Not only that, the structure of the data in such text files is very hard to work with, a programming point of view but from a research </text:span><text:soft-page-break/><text:span text:style-name="T12">point of view too. We transformed the txt file into a csv file such that it is easier to work with. Considering we do not have computers with enough RAM memory to read all of the data at once we tried to find some workarounds. One way would have been to break the large files into many smaller but manageable sized files. Or to only consider every 60</text:span><text:span text:style-name="T13">th</text:span><text:span text:style-name="T12"> entry in the data, considering measurements as if they were taken minute by minute </text:span><text:span text:style-name="T14">(resampling)</text:span><text:span text:style-name="T12">. </text:span><text:span text:style-name="T15">For some parts of the analysis we also considered only the first n entries of the data </text:span><text:span text:style-name="T14">(windowing)</text:span><text:span text:style-name="T15">. </text:span><text:span text:style-name="T14">Other than that some entires of the dataset had to be eliminated due to insufficient data in the lines of the txt file. Unfortunately there were faulty sensors that gave us invalid data or no data at all, that we had to just ignore. We could not interpolate these entries because we couldn’t have kept the continuity of the data, but more than that, in case of some sensors there was missing data for a huge number of entries. </text:span><text:span text:style-name="T16">For finding correlations between certain sensor values the data was normalized </text:span><text:span text:style-name="T17">(mean-centered and scaled to </text:span><text:span text:style-name="T17">unit</text:span><text:span text:style-name="T17"> variance).</text:span></text:p>
      <text:p text:style-name="P21"/>
      <text:p text:style-name="P10">Method</text:p>
      <text:p text:style-name="P10"/>
      <text:p text:style-name="P22"><text:span text:style-name="T18">W</text:span><text:span text:style-name="T18">e used multiple methods for our analysis.</text:span></text:p>
      <text:p text:style-name="P23"/>
      <text:p text:style-name="P23">Finding correlation <text:span text:style-name="T19">and trendlines</text:span>:</text:p>
      <text:list text:style-name="L2">
        <text:list-item>
          <text:p text:style-name="P24"><text:span text:style-name="T16">We used matplotlib and numpy python libraries to find the correlation between sensors </text:span><text:span text:style-name="T20">(Pearson coefficient)</text:span><text:span text:style-name="T16">. We used the following numpy functions: </text:span><text:span text:style-name="Source_20_Text"><text:span text:style-name="T21">corrcoef, polyfit. </text:span></text:span><text:span text:style-name="Source_20_Text"><text:span text:style-name="T22">And these are the relevant matplotlib methods: hexbin, imshow.</text:span></text:span></text:p>
        </text:list-item>
      </text:list>
      <text:p text:style-name="P25"><text:span text:style-name="Source_20_Text"><text:span text:style-name="T22"/></text:span></text:p>
      <text:p text:style-name="P10"/>
      <text:p text:style-name="P10">Validation and demonstration</text:p>
      <text:p text:style-name="P10"/>
      <text:p text:style-name="P10">Results</text:p>
      <text:p text:style-name="P10"/>
      <text:p text:style-name="P10">Comparison and parameter effects</text:p>
      <text:p text:style-name="P10"/>
      <text:p text:style-name="P10">Discussion and limitations</text:p>
      <text:p text:style-name="P10"/>
      <text:p text:style-name="P10">Conclusion</text:p>
      <text:p text:style-name="P10"/>
      <text:p text:style-name="P10">Code and reproducibility</text:p>
      <text:p text:style-name="P10"/>
      <text:p text:style-name="P10">Referen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8T17:57:35.300837835</meta:creation-date>
    <dc:date>2026-06-19T01:09:38.016645731</dc:date>
    <meta:editing-duration>PT1H11M20S</meta:editing-duration>
    <meta:editing-cycles>8</meta:editing-cycles>
    <meta:generator>LibreOffice/25.8.7.3$Linux_X86_64 LibreOffice_project/580$Build-3</meta:generator>
    <meta:document-statistic meta:table-count="0" meta:image-count="2" meta:object-count="0" meta:page-count="4" meta:paragraph-count="36" meta:word-count="1075" meta:character-count="6556" meta:non-whitespace-character-count="5490"/>
  </office:meta>
</office:document-meta>
</file>