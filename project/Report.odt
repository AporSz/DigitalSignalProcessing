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E0000016EC3032C43.png" manifest:media-type="image/png"/>
  <manifest:file-entry manifest:full-path="Pictures/100000010000022C000001878F78466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Heading_20_1">
      <style:paragraph-properties fo:text-align="center" style:justify-single-word="false"/>
      <style:text-properties officeooo:paragraph-rsid="00185506"/>
    </style:style>
    <style:style style:name="P2" style:family="paragraph" style:parent-style-name="Preformatted_20_Text">
      <style:paragraph-properties fo:text-align="center" style:justify-single-word="false"/>
      <style:text-properties officeooo:paragraph-rsid="00185506"/>
    </style:style>
    <style:style style:name="P3" style:family="paragraph" style:parent-style-name="Preformatted_20_Text">
      <style:paragraph-properties fo:text-align="center" style:justify-single-word="false"/>
    </style:style>
    <style:style style:name="P4" style:family="paragraph" style:parent-style-name="Preformatted_20_Text">
      <style:paragraph-properties fo:margin-top="0in" fo:margin-bottom="0.1965in" style:contextual-spacing="false" fo:text-align="center" style:justify-single-word="false"/>
    </style:style>
    <style:style style:name="P5" style:family="paragraph" style:parent-style-name="Preformatted_20_Text">
      <style:paragraph-properties fo:margin-top="0in" fo:margin-bottom="0.1965in" style:contextual-spacing="false" fo:text-align="center" style:justify-single-word="false"/>
      <style:text-properties officeooo:paragraph-rsid="00185506"/>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text-properties fo:font-size="12pt" fo:font-weight="normal" officeooo:rsid="001a3f29" officeooo:paragraph-rsid="001a3f29" style:font-size-asian="10.5pt" style:font-weight-asian="normal" style:font-size-complex="12pt" style:font-weight-complex="normal"/>
    </style:style>
    <style:style style:name="P8" style:family="paragraph" style:parent-style-name="Standard">
      <style:text-properties fo:font-size="12pt" fo:font-weight="bold" style:font-size-asian="10.5pt" style:font-weight-asian="bold" style:font-size-complex="12pt" style:font-weight-complex="bold"/>
    </style:style>
    <style:style style:name="P9" style:family="paragraph" style:parent-style-name="Standard">
      <style:text-properties fo:font-size="16pt" fo:font-weight="bold" officeooo:rsid="0018e823" officeooo:paragraph-rsid="0018e823" style:font-size-asian="16pt" style:font-weight-asian="bold" style:font-size-complex="16pt" style:font-weight-complex="bold"/>
    </style:style>
    <style:style style:name="P10" style:family="paragraph" style:parent-style-name="Standard">
      <style:text-properties fo:font-size="12pt" fo:font-weight="normal" officeooo:rsid="001a3f29" officeooo:paragraph-rsid="001dd10c" style:font-size-asian="10.5pt" style:font-weight-asian="normal" style:font-size-complex="12pt" style:font-weight-complex="normal"/>
    </style:style>
    <style:style style:name="P11" style:family="paragraph" style:parent-style-name="Standard">
      <style:text-properties fo:font-size="12pt" fo:font-weight="normal" officeooo:rsid="001dd10c" officeooo:paragraph-rsid="001dd10c" style:font-size-asian="10.5pt" style:font-weight-asian="normal" style:font-size-complex="12pt" style:font-weight-complex="normal"/>
    </style:style>
    <style:style style:name="P12" style:family="paragraph" style:parent-style-name="Standard">
      <loext:graphic-properties draw:fill="solid" draw:fill-color="#1e1e2e"/>
      <style:paragraph-properties fo:background-color="#1e1e2e" fo:padding="0in" fo:border="none" style:shadow="none"/>
    </style:style>
    <style:style style:name="P13" style:family="paragraph" style:parent-style-name="Standard">
      <style:text-properties fo:font-size="12pt" fo:font-weight="normal" officeooo:rsid="001a3f29" officeooo:paragraph-rsid="001f840b" style:font-size-asian="10.5pt" style:font-weight-asian="normal" style:font-size-complex="12pt" style:font-weight-complex="normal"/>
    </style:style>
    <style:style style:name="P14" style:family="paragraph" style:parent-style-name="Standard">
      <style:text-properties fo:font-size="16pt" fo:font-weight="bold" officeooo:rsid="001dd10c" officeooo:paragraph-rsid="001dd10c" style:font-size-asian="16pt" style:font-weight-asian="bold" style:font-size-complex="16pt" style:font-weight-complex="bold"/>
    </style:style>
    <style:style style:name="P15" style:family="paragraph" style:parent-style-name="Standard">
      <style:text-properties fo:font-size="12pt" fo:font-weight="normal" officeooo:rsid="00210375" officeooo:paragraph-rsid="00210375" style:font-size-asian="10.5pt" style:font-weight-asian="normal" style:font-size-complex="12pt" style:font-weight-complex="normal"/>
    </style:style>
    <style:style style:name="T1" style:family="text">
      <style:text-properties style:font-name="Liberation Mono" fo:font-size="24pt" style:font-name-asian="Liberation Mono" style:font-size-asian="24pt" style:font-name-complex="Liberation Mono" style:font-size-complex="24pt"/>
    </style:style>
    <style:style style:name="T2" style:family="text">
      <style:text-properties officeooo:rsid="00185506"/>
    </style:style>
    <style:style style:name="T3" style:family="text">
      <style:text-properties officeooo:rsid="001c0ba9"/>
    </style:style>
    <style:style style:name="T4" style:family="text">
      <style:text-properties style:text-position="super 58%"/>
    </style:style>
    <style:style style:name="T5" style:family="text">
      <style:text-properties officeooo:rsid="001f840b"/>
    </style:style>
    <style:style style:name="T6" style:family="text">
      <style:text-properties style:text-position="super 58%" officeooo:rsid="001f840b"/>
    </style:style>
    <style:style style:name="T7" style:family="text">
      <style:text-properties fo:color="#cdd6f4" loext:opacity="100%" fo:font-family="'JetBrains Mono'" style:font-family-generic="roman" style:font-pitch="variable" fo:font-size="10pt" fo:font-style="normal" fo:font-weight="normal" style:font-size-asian="10pt" style:font-style-asian="normal" style:font-weight-asian="normal"/>
    </style:style>
    <style:style style:name="T8" style:family="text">
      <style:text-properties fo:color="#a6e3a1" loext:opacity="100%" fo:font-family="'JetBrains Mono'" style:font-family-generic="roman" style:font-pitch="variable" fo:font-size="10pt" fo:font-style="normal" fo:font-weight="normal" style:font-size-asian="10pt" style:font-style-asian="normal" style:font-weight-asian="normal"/>
    </style:style>
    <style:style style:name="T9" style:family="text">
      <style:text-properties officeooo:rsid="0022e78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ource_20_Text"><text:span text:style-name="T1">CO₂ Dynamics in a Mofette</text:span></text:span></text:h>
      <text:p text:style-name="P2"><text:span text:style-name="Source_20_Text"/></text:p>
      <text:p text:style-name="P2"><text:span text:style-name="Source_20_Text"/></text:p>
      <text:p text:style-name="P2"><text:span text:style-name="Source_20_Text"><text:span text:style-name="T2">Andreescu Arthur-Daniel</text:span></text:span></text:p>
      <text:p text:style-name="P3"><text:span text:style-name="Source_20_Text">Popescu Lucian</text:span></text:p>
      <text:p text:style-name="P4"><text:span text:style-name="Source_20_Text">Szakács Apor-Tamás</text:span></text:p>
      <text:p text:style-name="P5"><text:span text:style-name="Source_20_Text"><text:span text:style-name="T2">18.06.2026</text:span></text:span></text:p>
      <text:p text:style-name="Standard"/>
      <text:p text:style-name="P6"><text:span text:style-name="T2">A</text:span>im and research</text:p>
      <text:p text:style-name="P6"/>
      <text:p text:style-name="P7">The aim of the project is to analyze and find periodicity in the sensor data provided about the mofette. We also work on the restructuring and analysis of the data and the validity of the data.</text:p>
      <text:p text:style-name="P8"/>
      <text:p text:style-name="P9">Background</text:p>
      <text:p text:style-name="P9"/>
      <text:p text:style-name="P10">Our study is based on a research paper from 2025 titled: CO2 Dynamics in a Mofette: Measurement and Modeling. The paper is about the monitoring of gas concentration, temperature, humidity and air pressure inside a mofette <text:span text:style-name="T3">in Covasna</text:span>.</text:p>
      <text:p text:style-name="P10"><draw:frame draw:style-name="fr1" draw:name="Image1" text:anchor-type="char" svg:width="5.7917in" svg:height="4.0728in" draw:z-index="0"><draw:image xlink:href="Pictures/100000010000022C000001878F784667.png" xlink:type="simple" xlink:show="embed" xlink:actuate="onLoad" draw:mime-type="image/png"/></draw:frame></text:p>
      <text:p text:style-name="P10">A mofette is <text:span text:style-name="T3">a vent from which CO2 and other gases escape from the earth in a last stage of volcanic activity. Buildings are built around these vents for medical purposes to releave certain circulatory problems. A measurement device was placed in such a building and we’re working on a dataset produced by the device. The device has 20 STC31 sensors that measure CO2 concentration and </text:span><text:soft-page-break/><text:span text:style-name="T3">temperature. These sensors were placed 5 cm apart vertically. There were 4 additional such sensors on the side of the device. Besides that, there were also 2 BMP280 sensors measuring barometric pressure and temperature on the top and bottom of the device and 2 DHT11 humidity sensors also on the top and on the bottom of the device.</text:span></text:p>
      <text:p text:style-name="P10"/>
      <text:p text:style-name="P10"/>
      <text:p text:style-name="P10"><draw:frame draw:style-name="fr2" draw:name="Image2" text:anchor-type="char" svg:width="6.9252in" svg:height="3.7827in" draw:z-index="1"><draw:image xlink:href="Pictures/100000010000029E0000016EC3032C43.png" xlink:type="simple" xlink:show="embed" xlink:actuate="onLoad" draw:mime-type="image/png"/></draw:frame></text:p>
      <text:p text:style-name="P9"/>
      <text:p text:style-name="P9">Data</text:p>
      <text:p text:style-name="P9"/>
      <text:p text:style-name="P11">The data represent the monitoring period from the 8<text:span text:style-name="T4">th</text:span> of April, 2022, to the 7<text:span text:style-name="T4">th</text:span> of November, 2022. The dataset spans over 200 days and has 17.3 million recordings in it. Measurements were taken second by second. We got access to a file named ‘new_device_column1.txt’ which had alternating lines of timestamps and measurement data. The raw text file was around 6 GB. <text:span text:style-name="T5">The entries in the text file looked like this: 1</text:span><text:span text:style-name="T6">st</text:span><text:span text:style-name="T5"> line – timestamp, 2</text:span><text:span text:style-name="T6">nd</text:span><text:span text:style-name="T5"> line – barometric pressure, humidity, temperature on the top, barometric pressure, humidity, temperature on the bottom, then CO2 and temperature of main STC31 sensors 1 to 20, then the CO2 and temperature values of the STC31 sensors from the side (1 to 4).</text:span></text:p>
      <text:p text:style-name="P11"/>
      <text:p text:style-name="P12" loext:marker-style-name="T7"><text:span text:style-name="T7">Example Lines from the Data File<text:line-break/><text:line-break/>1649455396.5622404 b'93512.25 65.00 9.34 93925.87 89.00 8.37 75.60 8.38 74.48 8.48 72.94 8.53 70.99 8.59 69.48 8.74 67.15 8.91 65.19 9.17 62.17 9.46 59.56 9.75 56.56 9.69 52.60 9.47 48.85 9.38 45.32 9.26 40.85 9.28 35.84 9.29 29.83 9.32 23.54 9.26 8.60 9.33 15.15 9.34 4.57 9.46 48.37 8.94 55.18 8.83 61.56 8.77 66.92 8.60 \r\n' 1649455396.5795734 b'93512.25 65.00 9.34 93925.70 89.00 8.37 75.62 8.40 74.51 8.48 72.96 8.55 71.04 8.61 69.43 8.75 66.89 8.90 65.19 9.20 62.06 9.45 59.33 9.73 56.30 9.72 52.24 9.41 48.61 9.40 45.13 9.29 40.63 9.28 35.68 9.27 29.63 9.29 23.34 9.26 </text:span><text:soft-page-break/><text:span text:style-name="T7">8.37 9.34 14.93 9.33 4.52 9.43 48.25 8.92 55.13 8.80 61.44 8.78 66.76 8.58 \r\n'<text:line-break/></text:span></text:p>
      <text:p text:style-name="P11"/>
      <text:p text:style-name="P11"/>
      <text:p text:style-name="P12" loext:marker-style-name="T8"><text:span text:style-name="T8">Example 1: b'93512.25 65.00 9.34 ... 66.92 8.60 \r\n'<text:line-break/> <text:s text:c="3"/>93512.25 - Barometric pressure (topmost BMP280)<text:line-break/> <text:s text:c="3"/>65.00 - Humidity (topmost DHT11)<text:line-break/> <text:s text:c="3"/>9.34 - Temperature (topmost BMP280)<text:line-break/> <text:s text:c="3"/>93925.87 - Barometric pressure (bottommost BMP280)<text:line-break/> <text:s text:c="3"/>89.00 - Humidity (bottommost DHT11)<text:line-break/> <text:s text:c="3"/>8.37 - Temperature (bottommost BMP280)<text:line-break/> <text:s text:c="3"/>75.60 8.38 ... 29.63 9.29 - CO2 concentrations and temperatures from STC31 sensors in the main stack<text:line-break/> <text:s text:c="3"/>48.37 8.94 55.18 8.83 61.56 8.77 66.92 8.60 - CO2 concentrations and temperatures from STC31 sensors in the side tube</text:span></text:p>
      <text:p text:style-name="P13"/>
      <text:p text:style-name="P14"/>
      <text:p text:style-name="P9">Preprocessing</text:p>
      <text:p text:style-name="P9"/>
      <text:p text:style-name="P15">Working with data this large requires 50 GB of RAM to load in memory. Not only that, the structure of the data in such text files is very hard to work with, a programming point of view but from a research point of view too. We transformed the txt file into a csv file such that it is easier to work with. Considering we do not have computers with enough RAM memory to read all of the data at once we tried to find some workarounds. One way would have been to break the large files into many smaller but manageable sized files. Or to only consider every 60<text:span text:style-name="T4">th</text:span> entry in the data, considering measurements as if they were taken minute by minute. <text:span text:style-name="T9">For some parts of the analysis we also considered only the first n entries of the data.</text:span></text:p>
      <text:p text:style-name="P9"/>
      <text:p text:style-name="P9">Method</text:p>
      <text:p text:style-name="P9"/>
      <text:p text:style-name="P9">Validation and demonstration</text:p>
      <text:p text:style-name="P9"/>
      <text:p text:style-name="P9">Results</text:p>
      <text:p text:style-name="P9"/>
      <text:p text:style-name="P9">Comparison and parameter effects</text:p>
      <text:p text:style-name="P9"/>
      <text:p text:style-name="P9">Discussion and limitations</text:p>
      <text:p text:style-name="P9"/>
      <text:p text:style-name="P9">Conclusion</text:p>
      <text:p text:style-name="P9"/>
      <text:p text:style-name="P9">Code and reproducibility</text:p>
      <text:p text:style-name="P9"/>
      <text:p text:style-name="P9">Referen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8T17:57:35.300837835</meta:creation-date>
    <dc:date>2026-06-18T19:54:51.274755629</dc:date>
    <meta:editing-duration>PT26M36S</meta:editing-duration>
    <meta:editing-cycles>2</meta:editing-cycles>
    <meta:generator>LibreOffice/25.8.7.3$Linux_X86_64 LibreOffice_project/580$Build-3</meta:generator>
    <meta:document-statistic meta:table-count="0" meta:image-count="2" meta:object-count="0" meta:page-count="3" meta:paragraph-count="24" meta:word-count="687" meta:character-count="4083" meta:non-whitespace-character-count="3385"/>
  </office:meta>
</office:document-meta>
</file>